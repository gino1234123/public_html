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8.128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8.534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同洵網站產品清單2025_5f_5_5f_8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同洵網站產品清單2025_5_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ategory_slug</text:p>
          </table:table-cell>
          <table:table-cell office:value-type="string" calcext:value-type="string">
            <text:p>product_slu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30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38-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60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38-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75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38-7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紅標高粱（60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r-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紅標高粱（75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r-7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30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-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60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-6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750ml）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-7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特優58度高粱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kkl58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戰酒黑金龍</text:p>
          </table:table-cell>
          <table:table-cell/>
          <table:table-cell office:value-type="string" calcext:value-type="string">
            <text:p>kinmen_kaoliang</text:p>
          </table:table-cell>
          <table:table-cell office:value-type="string" calcext:value-type="string">
            <text:p>wjhj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紅標料理米酒（600ml20入）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rcmj-600x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清酒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yqs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紹興酒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yq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黃酒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yqhj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紅露酒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yqh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紅麴葡萄酒</text:p>
          </table:table-cell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yqhq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三隻猴子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3m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2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dm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5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dm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2年雪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dm12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菲迪12年天使雪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fd12a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吉拉12年雪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l12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百富12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bf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百富14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bf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莉威13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lv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皇家禮炮21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rs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8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l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2年（1000ml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f12-1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2年（700ml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f12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5年（700ml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f15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8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gf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軒尼詩 VSOP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hvso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麥卡倫雙桶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mcd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塔木嶺雪莉三桶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tlsh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塔木嶺玩桶系列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tlw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詩貝雪莉12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b12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詩貝總裁雪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bzz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亞洲版(700ml)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2as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亞洲版(1000ml)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2as-1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雪莉桶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2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歐洲版(700ml)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2eu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歐洲版(1000ml)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2eu-1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5年亞洲版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5a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3年貴腐甜酒桶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sgd13n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 XR 21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jwxr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金牌威士忌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jwg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黑牌12年（1000ml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jwbp12-1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綠牌15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jwgp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黑牌12年（700ml）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jwbp12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2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mh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4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mh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6年</text:p>
          </table:table-cell>
          <table:table-cell/>
          <table:table-cell office:value-type="string" calcext:value-type="string">
            <text:p>whisky</text:p>
          </table:table-cell>
          <table:table-cell office:value-type="string" calcext:value-type="string">
            <text:p>mh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季威士忌(700ml)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jws-7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季威士忌(1000ml)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jws-1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三得利角瓶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stj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原味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水蜜桃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蘋果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零醣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草莓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養樂多燒酒</text:p>
          </table:table-cell>
          <table:table-cell/>
          <table:table-cell office:value-type="string" calcext:value-type="string">
            <text:p>korean_soju</text:p>
          </table:table-cell>
          <table:table-cell office:value-type="string" calcext:value-type="string">
            <text:p>cycl-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金牌台灣啤酒</text:p>
          </table:table-cell>
          <table:table-cell/>
          <table:table-cell office:value-type="string" calcext:value-type="string">
            <text:p>keg_beer</text:p>
          </table:table-cell>
          <table:table-cell office:value-type="string" calcext:value-type="string">
            <text:p>t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柏克金德式小麥生啤酒</text:p>
          </table:table-cell>
          <table:table-cell/>
          <table:table-cell office:value-type="string" calcext:value-type="string">
            <text:p>keg_beer</text:p>
          </table:table-cell>
          <table:table-cell office:value-type="string" calcext:value-type="string">
            <text:p>bkjw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柏克金黃金拉格生啤酒</text:p>
          </table:table-cell>
          <table:table-cell/>
          <table:table-cell office:value-type="string" calcext:value-type="string">
            <text:p>keg_beer</text:p>
          </table:table-cell>
          <table:table-cell office:value-type="string" calcext:value-type="string">
            <text:p>bkjg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日系啤酒</text:p>
          </table:table-cell>
          <table:table-cell/>
          <table:table-cell office:value-type="string" calcext:value-type="string">
            <text:p>keg_beer</text:p>
          </table:table-cell>
          <table:table-cell office:value-type="string" calcext:value-type="string">
            <text:p>j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百威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b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金樽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jz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雪山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ss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可樂娜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cl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BAR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bar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麒麟一番搾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qlyf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金牌啤酒含退瓶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jpb-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台灣啤酒含退箱瓶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twb-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18天生啤酒含退箱瓶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18d-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沖繩Orion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or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海尼根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hn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惠比壽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yb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黃金拉格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bkg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德式小麥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bkw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科龍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bkk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台灣特釀黑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tws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三得利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stl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朝日啤酒</text:p>
          </table:table-cell>
          <table:table-cell/>
          <table:table-cell office:value-type="string" calcext:value-type="string">
            <text:p>beer_bottles_big</text:p>
          </table:table-cell>
          <table:table-cell office:value-type="string" calcext:value-type="string">
            <text:p>as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百威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b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金尊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jzu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可樂娜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cl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麒麟BAR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qlb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海尼根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hn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金牌啤酒</text:p>
          </table:table-cell>
          <table:table-cell/>
          <table:table-cell office:value-type="string" calcext:value-type="string">
            <text:p>beer_bottles_small</text:p>
          </table:table-cell>
          <table:table-cell office:value-type="string" calcext:value-type="string">
            <text:p>j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百威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b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百威金尊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bd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BAR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b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一番搾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yfz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可樂娜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cl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淡麗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d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金牌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j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台灣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tw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18天生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18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雪山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ss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海尼根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hn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9%(300ml)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bj9-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德式小麥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bkw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黃金拉格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bkg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科龍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bkk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惠比壽啤酒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yb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5%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bj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7%(500ml)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bj7-5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9%(500ml)</text:p>
          </table:table-cell>
          <table:table-cell/>
          <table:table-cell office:value-type="string" calcext:value-type="string">
            <text:p>beer_cans</text:p>
          </table:table-cell>
          <table:table-cell office:value-type="string" calcext:value-type="string">
            <text:p>qlbj9-5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台鹽鹼性離子水(850ml)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tyalk-8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台鹽鹼性離子水(1500ml)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tyalk-15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悅氏純淨水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ys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黑松純水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hsc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埔里大水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plw-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埔里小水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plw-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極品金萱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zxjc-j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高山青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zxjc-g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桂花烏龍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zxjc-g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系列蜂蜜檸檬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td-hml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系列冬瓜檸檬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td-dgl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手沖泰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td-t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采冠冷泡茶高山烏龍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cglp-gsw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冬瓜檸檬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wj-dgl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鴉片檸檬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wj-ypl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伯爵奶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wj-bj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烏龍奶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wj-wl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之味分解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awfj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美粒果柳橙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mlg-o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美粒果白葡萄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mlg-w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冷翠日式綠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lcrs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原翠日式綠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crs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之味麥仔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awmz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芭樂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glj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柳橙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ocj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油切綠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yq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烏梅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wmj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優纖沛蔓越莓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xp-cr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梅子綠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mz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式油切烏龍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ys-yqw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每朝健康綠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mcjk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香吉士芭樂汁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xjs-glj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大苑子仙草甘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dyz-xcg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泰山冰鎮紅茶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ts-bz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老北京酸梅湯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lbj-sm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可爾必思水語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kebs-s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蘋果蘋果飲料</text:p>
          </table:table-cell>
          <table:table-cell/>
          <table:table-cell office:value-type="string" calcext:value-type="string">
            <text:p>beverage_1L</text:p>
          </table:table-cell>
          <table:table-cell office:value-type="string" calcext:value-type="string">
            <text:p>ap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大西洋蘋果西打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dxy-pgs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維他露大蘋果蘇打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wdl-pg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可口可樂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co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雪碧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spri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黑松沙士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hs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美粒果柳橙汁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lg-o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美粒果白葡萄汁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lg-w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茶裏王日式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clw-rs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茶裏王台式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clw-ts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大苑子蘋果氣泡醋飲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dyz-pgqp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泰山冰鎮紅水果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ts-hsg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光泉冷泡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gq-lp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愛之味麥仔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awmz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古道梅子百香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gd-mzbx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每朝健康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cjk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統一麥香奶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tymx-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統一麥香紅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tymx-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舒跑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supa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猛將仙草蜜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j-xc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猛將椰子水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j-yz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原翠日式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ycrsg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原翠烏龍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yc-wl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礦沛氣泡水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kpqp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飛想檸檬紅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fx-lm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花傳皇家奶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hc-hj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花傳皇家紅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hc-hj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可口可樂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co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雪碧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pri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可爾必思水語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kebs-s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黑松沙士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hs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維大力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wd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新蠻牛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xm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跑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upa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伯朗咖啡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lc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伯朗藍山咖啡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ll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阿薩姆奶茶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asm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親親蘆筍汁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qqls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蘇打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s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通寧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t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薑汁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j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半天水椰子100%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ts-yz1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半天水椰子30%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ts-yz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綠之鄉蘆薈蜜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lzx-lh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天然蜂蜜蘆薈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tr-hml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紅牛RED BULL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r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魔爪能量飲料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monst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可口可樂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co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雪碧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spri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美粒果清果汁柳橙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mlg-qgzo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美粒果清果汁蘋果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mlg-qgzp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芬達橘子汽水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fanta-or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飛想檸檬紅茶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fx-lm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麥香紅茶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mx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麥香奶茶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mx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蘆筍汁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asparagus-ju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葡萄蘋果汁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grape-apple-ju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舒跑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supau-sports-drin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統一蜜豆奶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uni-honey-soymil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初銘紅茶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early-black-te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小果汁系列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mini-juice-se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紅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cabernet-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黃喜若紅葡萄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yellow-shira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橘梅洛紅葡萄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orange-merlo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喜諾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shira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格納西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grenach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卡貝納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caberne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特藏卡貝納威士忌桶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cabernet-whisky-barre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寶翠卡貝納蘇維翁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cabernet-sauvignon-reserv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旗艦喜若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shiraz-flagshi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智利聖塔VSC頂級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anta-vsc-premium-red-c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台灣艾利冰鎮玫瑰紅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iry-tw-rose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柯提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pain-corti-red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法國蒙聖傑AOP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fr-montstjean-aop-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小紅帽奧蘭酒千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pain-red-cap-oran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法國波爾多莊園瑞夢湖AOP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bordeaux-raymond-lake-ao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智利三輪車卡本內頂級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chile-tricycle-caberne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義大利博特酒莊巧藝復古16紅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italy-botte-vintage-red-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阿根廷黃金貝殼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rg-gold-shell-caberne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阿根廷黃金貝殼特藏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rg-gold-shell-reserve-caberne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義大利蒂芬妮月光寶麝香氣泡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tiffany-moonlight-muscat-sparkl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三得利朵莉卡氣泡酒(白)慕斯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untory-dorika-sparkling-whi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粉紅(白)慕斯卡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pink-muscat-sparkl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鋁箔包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tetra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玻璃瓶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glass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一口杯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cup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鮮榨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fresh-pressed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純米糯米四段仕入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junmai-four-ste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慶祝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celebration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純米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junmai-ginj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特別本釀造山田錦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honjozo-yamad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吟釀生貯藏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ginjo-na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片野櫻純米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atano-sakura-junmai-ginj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泡湯後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onsen-after-ginj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溫泉後爽冷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onsen-refresh-cold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復古瓶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retro-bott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黑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blac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紅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國士無雙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okushimusou-s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小西冷榨大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onishi-cold-pressed-daiginj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小西冷榨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onishi-cold-pressed-ginj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玉極閣本閣燒酎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yuji-ge-shoc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八海山特別純米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akaisan-special-junma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八海山特別本釀造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akaisan-honjoz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知多威士忌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chita-whi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起瓦士威士忌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chivas-whi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迷你組合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dassai-mini-se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二割三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dassai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三割九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dassai-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四割五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dassai-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冷泉伏特加原味/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freezing-spring-vodk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ABS絕對伏特加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absolut-vodk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思美洛伏特加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smirnoff-vodk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冰火伏特加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icefire-vodk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英人琴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beefeater-g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六角琴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roku-g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龍舌蘭金快活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tequila-gold-kinkats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百家得蘭姆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bacardi-r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德國野格利口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jagermeist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生命之水80%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spirytus-8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生命之水96%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spirytus-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MB香甜酒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mb-liqueur-mi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萊姆汁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lime-ju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貝禮詩香甜奶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baileys-irish-crea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卡魯哇咖啡香甜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kahlua-coffee-liqueu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三得利蜜瓜甜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suntory-melon-liqueu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君度橙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cointreau-orange-liqueu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艾碧斯綠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absinthe-gree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艾碧斯紅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absinthe-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DITA荔枝酒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dita-lychee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鮮爽水蜜桃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refresh-peach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鮮爽蘋果水蜜桃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refresh-apple-peach-w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300ml)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umenoyado-yuzu-3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720ml)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umenoyado-yuzu-7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1800ml)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umenoyado-yuzu-18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白鶴柚子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hakutsuru-yuz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白鶴梅酒原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hakutsuru-umeshu-ra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山崎焙煎樽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yamazaki-barrel-umes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大關完熟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ozeki-fully-ripe-umes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八鹿酒藏酒藏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yatsushika-umes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梅酒兩粒梅.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choya-umeshu-two-pl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梅酒迷你梅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choya-umeshu-mi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本格梅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choya-hon-umes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日本松井白蘭地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matsui-brandy-umesh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日本松井威士忌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matsui-whisky-umeshu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思源宋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體" style:font-family-asian="思源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9P0" style:volatile="true">
      <number:text>$</number:text>
      <number:number number:decimal-places="0" number:min-decimal-places="0" number:min-integer-digits="1" number:grouping="true"/>
    </number:currency-style>
    <number:currency-style style:name="N139">
      <number:text>-$</number:text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0" number:min-decimal-places="0" number:min-integer-digits="1" number:grouping="true"/>
    </number:currency-style>
    <number:currency-style style:name="N14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1P0" style:volatile="true">
      <number:text>$</number:text>
      <number:number number:decimal-places="2" number:min-decimal-places="2" number:min-integer-digits="1" number:grouping="true"/>
    </number:currency-style>
    <number:currency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currency-style>
    <number:currency-style style:name="N142P0" style:volatile="true">
      <number:text>$</number:text>
      <number:number number:decimal-places="2" number:min-decimal-places="2" number:min-integer-digits="1" number:grouping="true"/>
    </number:currency-style>
    <number:currency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currency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0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month/>
      <number:text>/</number:text>
      <number:day/>
      <number:text>/</number:text>
      <number:year/>
    </number:date-style>
    <number:date-style style:name="N153">
      <number:year number:style="long"/>
      <number:text>年</number:text>
      <number:month/>
      <number:text>月</number:text>
      <number:day/>
      <number:text>日</number:text>
    </number:date-style>
    <number:time-style style:name="N154">
      <number:am-pm/>
      <number:hours number:style="long"/>
      <number:text>時</number:text>
      <number:minutes number:style="long"/>
      <number:text>分</number:text>
    </number:time-style>
    <number:time-style style:name="N155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6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61P2" style:volatile="true">
      <number:text loext:blank-width-char="-"> $</number:text>
      <number:fill-character> </number:fill-character>
      <number:text loext:blank-width-char="-1">- </number:text>
    </number:currency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3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3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新細明體" fo:font-family="新細明體" style:font-family-generic="swiss" fo:font-size="12pt" fo:font-style="italic" fo:text-shadow="none" style:text-underline-style="none" fo:font-weight="normal" style:font-name-asian="新細明體" style:font-family-asian="新細明體" style:font-family-generic-asian="swiss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新細明體" fo:font-family="新細明體" style:font-family-generic="swiss" fo:font-size="15pt" fo:font-style="normal" fo:text-shadow="none" style:text-underline-style="none" fo:font-weight="bold" style:font-name-asian="新細明體" style:font-family-asian="新細明體" style:font-family-generic-asian="swiss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新細明體" fo:font-family="新細明體" style:font-family-generic="swiss" fo:font-size="13pt" fo:font-style="normal" fo:text-shadow="none" style:text-underline-style="none" fo:font-weight="bold" style:font-name-asian="新細明體" style:font-family-asian="新細明體" style:font-family-generic-asian="swiss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新細明體" fo:font-family="新細明體" style:font-family-generic="swiss" fo:font-size="18pt" fo:font-style="normal" fo:text-shadow="none" style:text-underline-style="none" fo:font-weight="bold" style:font-name-asian="新細明體" style:font-family-asian="新細明體" style:font-family-generic-asian="swiss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marker draw:name="線條箭頭_20_1" draw:display-name="線條箭頭 1" svg:viewBox="0 0 20 30" svg:d="M10 0l-10 30h20z"/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同洵網站產品清單2025_5f_5_5f_8" style:display-name="PageStyle_同洵網站產品清單2025_5_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print-date>2025-05-08T07:39:14</meta:print-date>
    <meta:creation-date>2025-04-02T06:48:03</meta:creation-date>
    <dc:date>2026-05-07T14:36:47.715000000</dc:date>
    <meta:generator>MODA_ODF_Application_Tools/4.0.4.2$Windows_X86_64 LibreOffice_project/44845c6227bc272b027b8d486d9fdb2bdcecbadd</meta:generator>
    <meta:editing-duration>PT17M6S</meta:editing-duration>
    <meta:editing-cycles>4</meta:editing-cycles>
    <meta:document-statistic meta:table-count="1" meta:cell-count="1161" meta:object-count="0"/>
    <meta:user-defined meta:name="AppVersion">14.0300</meta:user-defined>
  </office:meta>
</office:document-meta>
</file>